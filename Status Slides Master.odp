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A70000003976A066F5.png" manifest:media-type="image/png"/>
  <manifest:file-entry manifest:full-path="Pictures/10000001000003160000024ECFBEEDD5.png" manifest:media-type="image/png"/>
  <manifest:file-entry manifest:full-path="Pictures/10000001000003160000024E267C07AA.png" manifest:media-type="image/png"/>
  <manifest:file-entry manifest:full-path="Pictures/10000001000005BA0000021AC8DA1C05.png" manifest:media-type="image/png"/>
  <manifest:file-entry manifest:full-path="Pictures/10000000000003150000024ED6F67226.png" manifest:media-type="image/png"/>
  <manifest:file-entry manifest:full-path="Pictures/10000000000003160000024ED2E0F733.png" manifest:media-type="image/png"/>
  <manifest:file-entry manifest:full-path="Pictures/10000000000002EA00000186C1BB27D1.png" manifest:media-type="image/png"/>
  <manifest:file-entry manifest:full-path="Pictures/10000000000002E900000186E9027508.png" manifest:media-type="image/png"/>
  <manifest:file-entry manifest:full-path="Pictures/10000000000003160000024E1E357118.png" manifest:media-type="image/png"/>
  <manifest:file-entry manifest:full-path="Pictures/10000000000002E700000186E82F8EC6.png" manifest:media-type="image/png"/>
  <manifest:file-entry manifest:full-path="Pictures/10000001000001750000006DACE7F365.png" manifest:media-type="image/png"/>
  <manifest:file-entry manifest:full-path="Pictures/10000000000002E700000186ADAAF897.png" manifest:media-type="image/png"/>
  <manifest:file-entry manifest:full-path="Pictures/10000001000006A7000000390536C1BC.png" manifest:media-type="image/png"/>
  <manifest:file-entry manifest:full-path="Pictures/10000001000003160000024E3E4F2B22.png" manifest:media-type="image/png"/>
  <manifest:file-entry manifest:full-path="Pictures/1000000000000436000004535B18711D.png" manifest:media-type="image/png"/>
  <manifest:file-entry manifest:full-path="Pictures/10000000000002E900000186616910FE.png" manifest:media-type="image/png"/>
  <manifest:file-entry manifest:full-path="Pictures/100000000000043600000453DB8C9DEF.png" manifest:media-type="image/png"/>
  <manifest:file-entry manifest:full-path="Pictures/100000010000038F000002A4912B3462.png" manifest:media-type="image/png"/>
  <manifest:file-entry manifest:full-path="Pictures/100000000000021F0000019D2DCCB2B7.png" manifest:media-type="image/png"/>
  <manifest:file-entry manifest:full-path="Pictures/10000000000002E700000186799000EA.png" manifest:media-type="image/png"/>
  <manifest:file-entry manifest:full-path="Pictures/10000001000005470000044261C6BA69.png" manifest:media-type="image/png"/>
  <manifest:file-entry manifest:full-path="Pictures/100000010000018800000240D734A744.png" manifest:media-type="image/png"/>
  <manifest:file-entry manifest:full-path="Pictures/100000010000012A00000205C2F5CE86.png" manifest:media-type="image/png"/>
  <manifest:file-entry manifest:full-path="Pictures/10000001000004EE000003C6BFD43D22.png" manifest:media-type="image/png"/>
  <manifest:file-entry manifest:full-path="Pictures/10000000000002E9000001865DC90B2E.png" manifest:media-type="image/png"/>
  <manifest:file-entry manifest:full-path="Pictures/10000000000003160000024E2EC05BD0.png" manifest:media-type="image/png"/>
  <manifest:file-entry manifest:full-path="Pictures/10000000000004360000045354679D90.png" manifest:media-type="image/png"/>
  <manifest:file-entry manifest:full-path="Pictures/10000001000000BF0000005A59825E34.png" manifest:media-type="image/png"/>
  <manifest:file-entry manifest:full-path="Pictures/10000000000003160000024ECCF15396.png" manifest:media-type="image/png"/>
  <manifest:file-entry manifest:full-path="Pictures/1000000100000163000001E8C00D46F3.png" manifest:media-type="image/png"/>
  <manifest:file-entry manifest:full-path="Pictures/100000000000043600000453EA75035C.png" manifest:media-type="image/png"/>
  <manifest:file-entry manifest:full-path="Pictures/1000000000000436000004535EF9C615.png" manifest:media-type="image/png"/>
  <manifest:file-entry manifest:full-path="Pictures/10000001000000620000018F77AED062.png" manifest:media-type="image/png"/>
  <manifest:file-entry manifest:full-path="Pictures/1000000100000500000003EC4853D821.png" manifest:media-type="image/png"/>
  <manifest:file-entry manifest:full-path="Pictures/10000000000004360000045343675363.png" manifest:media-type="image/png"/>
  <manifest:file-entry manifest:full-path="Pictures/1000000100000331000003922211AC2F.png" manifest:media-type="image/png"/>
  <manifest:file-entry manifest:full-path="Pictures/100000010000018300000218FD9E7150.png" manifest:media-type="image/png"/>
  <manifest:file-entry manifest:full-path="Pictures/10000001000005A00000009B38BB35EB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us meeting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 layer</text:p>
              </text:list-item>
              <text:list-item>
                <text:p>0.2 sec</text:p>
              </text:list-item>
            </text:list>
          </draw:text-box>
        </draw:frame>
        <draw:frame draw:style-name="gr2" draw:text-style-name="P2" draw:layer="layout" svg:width="14.26cm" svg:height="14.644cm" svg:x="6.985cm" svg:y="0.641cm">
          <draw:image xlink:href="Pictures/100000000000043600000453DB8C9DEF.png" xlink:type="simple" xlink:show="embed" xlink:actuate="onLoad" draw:mime-type="image/png">
            <text:p/>
          </draw:image>
        </draw:frame>
        <draw:frame draw:style-name="gr2" draw:text-style-name="P2" draw:layer="layout" svg:width="6.525cm" svg:height="4.963cm" svg:x="21.475cm" svg:y="10.5cm">
          <draw:image xlink:href="Pictures/100000000000021F0000019D2DCCB2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0</text:p>
                <text:p>layers</text:p>
              </text:list-item>
              <text:list-item>
                <text:p>0.5 sec</text:p>
              </text:list-item>
            </text:list>
          </draw:text-box>
        </draw:frame>
        <draw:frame draw:style-name="gr2" draw:text-style-name="P2" draw:layer="layout" svg:width="14.26cm" svg:height="14.644cm" svg:x="6.985cm" svg:y="0.641cm">
          <draw:image xlink:href="Pictures/1000000000000436000004535B18711D.png" xlink:type="simple" xlink:show="embed" xlink:actuate="onLoad" draw:mime-type="image/png">
            <text:p/>
          </draw:image>
        </draw:frame>
        <draw:frame draw:style-name="gr2" draw:text-style-name="P2" draw:layer="layout" svg:width="8.729cm" svg:height="4.581cm" svg:x="20.5cm" svg:y="4.919cm">
          <draw:image xlink:href="Pictures/10000000000002E700000186ADAAF8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00</text:p>
                <text:p>layers</text:p>
              </text:list-item>
              <text:list-item>
                <text:p>2.9 sec</text:p>
              </text:list-item>
            </text:list>
          </draw:text-box>
        </draw:frame>
        <draw:frame draw:style-name="gr2" draw:text-style-name="P2" draw:layer="layout" svg:width="7.328cm" svg:height="3.846cm" svg:x="20.672cm" svg:y="7.154cm">
          <draw:image xlink:href="Pictures/10000000000002E700000186E82F8EC6.png" xlink:type="simple" xlink:show="embed" xlink:actuate="onLoad" draw:mime-type="image/png">
            <text:p/>
          </draw:image>
        </draw:frame>
        <draw:frame draw:style-name="gr2" draw:text-style-name="P2" draw:layer="layout" svg:width="14.26cm" svg:height="14.644cm" svg:x="6.985cm" svg:y="0.641cm">
          <draw:image xlink:href="Pictures/100000000000043600000453436753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000</text:p>
                <text:p>layers</text:p>
              </text:list-item>
              <text:list-item>
                <text:p>69 sec</text:p>
              </text:list-item>
            </text:list>
          </draw:text-box>
        </draw:frame>
        <draw:frame draw:style-name="gr2" draw:text-style-name="P2" draw:layer="layout" svg:width="14.26cm" svg:height="14.644cm" svg:x="6.985cm" svg:y="0.641cm">
          <draw:image xlink:href="Pictures/10000000000004360000045354679D90.png" xlink:type="simple" xlink:show="embed" xlink:actuate="onLoad" draw:mime-type="image/png">
            <text:p/>
          </draw:image>
        </draw:frame>
        <draw:frame draw:style-name="gr2" draw:text-style-name="P2" draw:layer="layout" svg:width="7.622cm" svg:height="4cm" svg:x="20.378cm" svg:y="4.5cm">
          <draw:image xlink:href="Pictures/10000000000002E700000186799000EA.png" xlink:type="simple" xlink:show="embed" xlink:actuate="onLoad" draw:mime-type="image/png">
            <text:p/>
          </draw:image>
        </draw:frame>
        <draw:frame draw:style-name="gr2" draw:text-style-name="P2" draw:layer="layout" svg:width="14.26cm" svg:height="14.644cm" svg:x="6.985cm" svg:y="0.641cm">
          <draw:image xlink:href="Pictures/1000000000000436000004535EF9C6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6.484cm" svg:height="8.616cm" svg:x="5.516cm" svg:y="4.384cm">
          <draw:image xlink:href="Pictures/10000000000002EA00000186C1BB27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5.61cm" svg:height="11.657cm" svg:x="6.39cm" svg:y="3cm">
          <draw:image xlink:href="Pictures/10000000000003160000024ED2E0F7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7.11cm" svg:height="12.778cm" svg:x="5.5cm" svg:y="2.222cm">
          <draw:image xlink:href="Pictures/10000000000003160000024E1E3571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3.961cm" svg:height="10.439cm" svg:x="7.039cm" svg:y="3.685cm">
          <draw:image xlink:href="Pictures/10000000000003150000024ED6F672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09-04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sol resu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 Structure, simple sine wave</text:p>
              </text:list-item>
              <text:list-item>
                <text:p>Runtime for wavelength sweep was 4 minutes 25 seconds</text:p>
              </text:list-item>
              <text:list-item>
                <text:p>Takes up much more storage space (1 gb?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7.145cm" svg:height="13.833cm" svg:x="4.855cm" svg:y="1.167cm">
          <draw:image xlink:href="Pictures/10000001000005470000044261C6BA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0.369cm" svg:height="15.237cm" svg:x="13cm" svg:y="0.513cm">
          <draw:image xlink:href="Pictures/100000010000018800000240D734A744.png" xlink:type="simple" xlink:show="embed" xlink:actuate="onLoad" draw:mime-type="image/png">
            <text:p/>
          </draw:image>
        </draw:frame>
        <draw:frame draw:style-name="gr2" draw:text-style-name="P2" draw:layer="layout" svg:width="7.882cm" svg:height="13.676cm" draw:transform="rotate (-3.14159265358979) translate (12.382cm 15.5cm)">
          <draw:image xlink:href="Pictures/100000010000012A00000205C2F5CE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0.497cm" svg:height="7.789cm" svg:x="15.503cm" svg:y="5cm">
          <draw:image xlink:href="Pictures/100000010000038F000002A4912B3462.png" xlink:type="simple" xlink:show="embed" xlink:actuate="onLoad" draw:mime-type="image/png">
            <text:p/>
          </draw:image>
        </draw:frame>
        <draw:frame draw:style-name="gr2" draw:text-style-name="P2" draw:layer="layout" svg:width="11.673cm" svg:height="8.935cm" svg:x="2.5cm" svg:y="5cm">
          <draw:image xlink:href="Pictures/10000001000004EE000003C6BFD43D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2/04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6cm" svg:height="12.642cm" svg:x="5.5cm" svg:y="2cm">
          <draw:image xlink:href="Pictures/10000000000003160000024E2EC05B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10.815cm" svg:x="1.301cm" svg:y="3.5cm" presentation:class="outline" presentation:user-transformed="true">
          <draw:text-box>
            <text:list text:style-name="L2">
              <text:list-item>
                <text:p>Likely the PEC!</text:p>
              </text:list-item>
              <text:list-item>
                <text:p>Skin depth of estimated</text:p>
                <text:p>pec is<text:line-break/></text:p>
                <text:p>so total<text:line-break/></text:p>
                <text:p/>
                <text:p><text:line-break/>PEC of comsol has perfect pi<text:line-break/>phase shift, whereas RCWA has non-zero<text:line-break/>skin depth penetration in structure</text:p>
              </text:list-item>
            </text:list>
          </draw:text-box>
        </draw:frame>
        <draw:frame draw:style-name="gr2" draw:text-style-name="P2" draw:layer="layout" svg:width="5.051cm" svg:height="2.379cm" svg:x="5.5cm" svg:y="5.5cm">
          <draw:image xlink:href="Pictures/10000001000000BF0000005A59825E34.png" xlink:type="simple" xlink:show="embed" xlink:actuate="onLoad" draw:mime-type="image/png">
            <text:p/>
          </draw:image>
        </draw:frame>
        <draw:frame draw:style-name="gr2" draw:text-style-name="P2" draw:layer="layout" svg:width="7.318cm" svg:height="2.138cm" svg:x="2.182cm" svg:y="8.379cm">
          <draw:image xlink:href="Pictures/10000001000001750000006DACE7F365.png" xlink:type="simple" xlink:show="embed" xlink:actuate="onLoad" draw:mime-type="image/png">
            <text:p/>
          </draw:image>
        </draw:frame>
        <draw:frame draw:style-name="gr2" draw:text-style-name="P2" draw:layer="layout" svg:width="10.45cm" svg:height="7.804cm" svg:x="16.5cm" svg:y="4cm">
          <draw:image xlink:href="Pictures/10000000000003160000024E2EC05B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Redid the model with explicit reflector block in Comsol, with same artifical permitivity<text:line-break/><text:line-break/></text:p>
              </text:list-item>
              <text:list-item>
                <text:p>This will ensure that resonant conditions at least are equivalent across simulation methods,</text:p>
              </text:list-item>
              <text:list-item>
                <text:p>Also better naturally extends to real material reflectors<text:line-break/>like silver</text:p>
              </text:list-item>
              <text:list-item>
                <text:p>And I get to remake the model in the same z-direction :) </text:p>
              </text:list-item>
            </text:list>
          </draw:text-box>
        </draw:frame>
        <draw:frame draw:style-name="gr3" draw:text-style-name="P3" draw:layer="layout" svg:width="3.527cm" svg:height="1.763cm" svg:x="12.351cm" svg:y="9.3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7.055cm" svg:height="1.093cm" svg:x="3.5cm" svg:y="6.4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made model with Impedance boundary conditions</text:p>
                <text:p/>
              </text:list-item>
              <text:list-item>
                <text:p>Results still did not work :(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0.807cm" svg:height="12.09cm" svg:x="1.5cm" svg:y="2.41cm">
          <draw:image xlink:href="Pictures/1000000100000331000003922211AC2F.png" xlink:type="simple" xlink:show="embed" xlink:actuate="onLoad" draw:mime-type="image/png">
            <text:p/>
          </draw:image>
        </draw:frame>
        <draw:frame draw:style-name="gr2" draw:text-style-name="P2" draw:layer="layout" svg:width="8.733cm" svg:height="12.007cm" svg:x="15.767cm" svg:y="3cm">
          <draw:image xlink:href="Pictures/1000000100000163000001E8C00D46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s really confused, until i found a factor 2 error in my RCWA code. Annoying, but now results coincide!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4.26cm" svg:height="14.644cm" svg:x="6.985cm" svg:y="0.641cm">
          <draw:image xlink:href="Pictures/100000000000043600000453EA7503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4.5cm" svg:height="11.373cm" svg:x="1.4cm" svg:y="1.627cm">
          <draw:image xlink:href="Pictures/1000000100000500000003EC4853D821.png" xlink:type="simple" xlink:show="embed" xlink:actuate="onLoad" draw:mime-type="image/png">
            <text:p/>
          </draw:image>
        </draw:frame>
        <draw:frame draw:style-name="gr2" draw:text-style-name="P2" draw:layer="layout" svg:width="8.071cm" svg:height="11.178cm" svg:x="16.763cm" svg:y="2cm">
          <draw:image xlink:href="Pictures/100000010000018300000218FD9E7150.png" xlink:type="simple" xlink:show="embed" xlink:actuate="onLoad" draw:mime-type="image/png">
            <text:p/>
          </draw:image>
        </draw:frame>
        <draw:frame draw:style-name="gr2" draw:text-style-name="P2" draw:layer="layout" svg:width="2.591cm" svg:height="10.554cm" svg:x="25.5cm" svg:y="2.5cm">
          <draw:image xlink:href="Pictures/10000001000000620000018F77AED0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3.978cm" svg:height="10.439cm" svg:x="6.5cm" svg:y="3.685cm">
          <draw:image xlink:href="Pictures/10000000000003160000024ECCF153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w looks like RCWA has a slight redshift.<text:line-break/><text:line-break/></text:p>
              </text:list-item>
              <text:list-item>
                <text:p>One more sanity check, calculate dissipated heat in same way with RCWA as comsol.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mall resonances might lead to larger divergences in comso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xt sto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ata generation, to get schedule back on track</text:p>
              </text:list-item>
              <text:list-item>
                <text:p>Code already (almost) works for 3d</text:p>
              </text:list-item>
              <text:list-item>
                <text:p>3d convergence tests in RCWA only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tin Hypercube Samp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 generate the random structures</text:p>
              </text:list-item>
            </text:list>
          </draw:text-box>
        </draw:frame>
        <draw:frame draw:style-name="gr2" draw:text-style-name="P2" draw:layer="layout" svg:width="24.885cm" svg:height="2.677cm" svg:x="1.5cm" svg:y="5.823cm">
          <draw:image xlink:href="Pictures/10000001000005A00000009B38BB35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tin Hypercube Samp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 generate the random structures</text:p>
              </text:list-item>
            </text:list>
          </draw:text-box>
        </draw:frame>
        <draw:frame draw:style-name="gr2" draw:text-style-name="P2" draw:layer="layout" svg:width="23.885cm" svg:height="8.764cm" svg:x="2.115cm" svg:y="5.236cm">
          <draw:image xlink:href="Pictures/10000001000005BA0000021AC8DA1C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tin Hypercube Samp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 generate the random structures</text:p>
              </text:list-item>
            </text:list>
          </draw:text-box>
        </draw:frame>
        <draw:frame draw:style-name="gr2" draw:text-style-name="P2" draw:layer="layout" svg:width="24.885cm" svg:height="2.677cm" svg:x="1.5cm" svg:y="5.823cm">
          <draw:image xlink:href="Pictures/10000001000005A00000009B38BB35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tin Hypercube Samp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 generate the random structures</text:p>
              </text:list-item>
            </text:list>
          </draw:text-box>
        </draw:frame>
        <draw:frame draw:style-name="gr2" draw:text-style-name="P2" draw:layer="layout" svg:width="24.885cm" svg:height="2.677cm" svg:x="1.5cm" svg:y="5.823cm">
          <draw:image xlink:href="Pictures/10000001000005A00000009B38BB35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06-0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vergence test well and good</text:p>
              </text:list-item>
              <text:list-item>
                <text:p>...but what about for more fine oscillations?</text:p>
              </text:list-item>
              <text:list-item>
                <text:p>And what about smoothing, does it do anyth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0.45cm" svg:height="7.804cm" svg:x="8.89cm" svg:y="4.061cm">
          <draw:image xlink:href="Pictures/10000001000003160000024E267C07AA.png" xlink:type="simple" xlink:show="embed" xlink:actuate="onLoad" draw:mime-type="image/png">
            <text:p/>
          </draw:image>
        </draw:frame>
        <draw:frame draw:style-name="gr4" draw:text-style-name="P3" draw:layer="layout" svg:width="22.11cm" svg:height="16.512cm" svg:x="3cm" svg:y="-0.012cm">
          <draw:image xlink:href="Pictures/10000001000003160000024E267C07AA.png" xlink:type="simple" xlink:show="embed" xlink:actuate="onLoad" draw:mime-type="image/png">
            <text:p/>
          </draw:image>
        </draw:frame>
        <draw:frame draw:style-name="gr4" draw:text-style-name="P3" draw:layer="layout" svg:width="21cm" svg:height="15.683cm" svg:x="3cm" svg:y="-0.012cm">
          <draw:image xlink:href="Pictures/10000001000003160000024E267C07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0.45cm" svg:height="7.804cm" svg:x="8.89cm" svg:y="4.061cm">
          <draw:image xlink:href="Pictures/10000001000003160000024E3E4F2B22.png" xlink:type="simple" xlink:show="embed" xlink:actuate="onLoad" draw:mime-type="image/png">
            <text:p/>
          </draw:image>
        </draw:frame>
        <draw:frame draw:style-name="gr4" draw:text-style-name="P3" draw:layer="layout" svg:width="20.317cm" svg:height="15.173cm" svg:x="3.5cm" svg:y="0.327cm">
          <draw:image xlink:href="Pictures/10000001000003160000024E3E4F2B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9.5cm" svg:height="14.562cm" svg:x="4cm" svg:y="0.938cm">
          <draw:image xlink:href="Pictures/10000001000003160000024ECFBEED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e 10 layers still fine if there is a much smaller<text:line-break/>oscillation include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presentation:style-name="pr4" draw:layer="layout" svg:width="25.199cm" svg:height="9.134cm" svg:x="1.401cm" svg:y="3.685cm" presentation:class="outline" presentation:placeholder="true" presentation:user-transformed="true">
          <draw:text-box/>
        </draw:frame>
        <draw:frame presentation:style-name="pr4" draw:layer="layout" svg:width="25.199cm" svg:height="9.134cm" svg:x="1.401cm" svg:y="3.685cm" presentation:class="outline" presentation:placeholder="true" presentation:user-transformed="true">
          <draw:text-box/>
        </draw:frame>
        <draw:frame draw:style-name="gr4" draw:text-style-name="P3" draw:layer="layout" svg:width="27.999cm" svg:height="0.935cm" svg:x="0.001cm" svg:y="1.065cm">
          <draw:image xlink:href="Pictures/10000001000006A7000000390536C1BC.png" xlink:type="simple" xlink:show="embed" xlink:actuate="onLoad" draw:mime-type="image/png">
            <text:p/>
          </draw:image>
        </draw:frame>
        <draw:frame draw:style-name="gr4" draw:text-style-name="P3" draw:layer="layout" svg:width="23.855cm" svg:height="12.485cm" svg:x="2.744cm" svg:y="3.015cm">
          <draw:image xlink:href="Pictures/10000000000002E900000186E90275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27.999cm" svg:height="0.935cm" svg:x="0.001cm" svg:y="1.065cm">
          <draw:image xlink:href="Pictures/10000001000006A70000003976A066F5.png" xlink:type="simple" xlink:show="embed" xlink:actuate="onLoad" draw:mime-type="image/png">
            <text:p/>
          </draw:image>
        </draw:frame>
        <draw:frame draw:style-name="gr4" draw:text-style-name="P3" draw:layer="layout" svg:width="24cm" svg:height="12.561cm" svg:x="2cm" svg:y="3.189cm">
          <draw:image xlink:href="Pictures/10000000000002E9000001865DC90B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27.999cm" svg:height="0.935cm" svg:x="0.001cm" svg:y="1.065cm">
          <draw:image xlink:href="Pictures/10000001000006A70000003976A066F5.png" xlink:type="simple" xlink:show="embed" xlink:actuate="onLoad" draw:mime-type="image/png">
            <text:p/>
          </draw:image>
        </draw:frame>
        <draw:frame draw:style-name="gr4" draw:text-style-name="P3" draw:layer="layout" svg:width="24.5cm" svg:height="12.823cm" svg:x="2cm" svg:y="3cm">
          <draw:image xlink:href="Pictures/10000000000002E900000186616910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0:16:56.128706699</meta:creation-date>
    <meta:editing-duration>PT2H14M39S</meta:editing-duration>
    <meta:editing-cycles>7</meta:editing-cycles>
    <meta:generator>LibreOffice/26.2.3.2$Linux_X86_64 LibreOffice_project/a31940f583db492bb69b3a601caf6d1b0ecf61f1</meta:generator>
    <dc:date>2026-05-06T10:27:10.725729564</dc:date>
    <meta:document-statistic meta:object-count="22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>ϵ</mi>
        <mo stretchy="false">=</mo>
        <mrow>
          <mrow>
            <mo stretchy="false">−</mo>
            <mn>10000</mn>
          </mrow>
          <mo stretchy="false">+</mo>
          <mn>0.0</mn>
        </mrow>
      </mrow>
      <mi>j</mi>
    </mrow>
    <annotation encoding="StarMath 5.0">%epsilon = -10000 + 0.0j
</annotation>
  </semantics>
</math>
</file>